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00000040089554F7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4586" loext:opacity="100%" fo:font-size="20pt" fo:font-weight="bold" officeooo:rsid="00126b42" officeooo:paragraph-rsid="00126b4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26b42" officeooo:paragraph-rsid="00126b4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7e0021" loext:opacity="100%" fo:font-size="16pt" fo:font-weight="bold" officeooo:rsid="00126b42" officeooo:paragraph-rsid="00126b4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26b42" officeooo:paragraph-rsid="00126b42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126b42" officeooo:paragraph-rsid="00126b4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26b42" officeooo:paragraph-rsid="00126b42" style:font-size-asian="12pt" style:font-weight-asian="bold" style:font-size-complex="12pt" style:font-weight-complex="bold"/>
    </style:style>
    <style:style style:name="P7" style:family="paragraph" style:parent-style-name="Horizontal_20_Line">
      <style:text-properties fo:font-size="12pt" fo:font-weight="bold" officeooo:rsid="00126b4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e0021" loext:opacity="100%" fo:font-size="18pt" fo:font-weight="bold" officeooo:rsid="00126b42" officeooo:paragraph-rsid="00126b42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-0.545cm, 21.98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HANA SILK E-COMMERCE PROJECT PLAN</text:p>
      <text:p text:style-name="P2"/>
      <text:p text:style-name="P3">COLOR PALETTE:</text:p>
      <text:p text:style-name="P4"/>
      <text:p text:style-name="P4"><draw:frame draw:style-name="fr1" draw:name="Image1" text:anchor-type="char" svg:width="17.171cm" svg:height="2.739cm" draw:z-index="0"><draw:image xlink:href="Pictures/10000000000006000000040089554F77.png" xlink:type="simple" xlink:show="embed" xlink:actuate="onLoad" draw:mime-type="image/png"/></draw:frame><text:tab/></text:p>
      <text:list text:style-name="L1">
        <text:list-item>
          <text:p text:style-name="P5">Primary - #0B1F3A</text:p>
        </text:list-item>
        <text:list-item>
          <text:p text:style-name="P5">Secondary - #F3E8D8</text:p>
        </text:list-item>
        <text:list-item>
          <text:p text:style-name="P5">Accent - #D4A657</text:p>
        </text:list-item>
        <text:list-item>
          <text:p text:style-name="P5">Dark - #3A0F0F</text:p>
        </text:list-item>
        <text:list-item>
          <text:p text:style-name="P5">Light - #FFFDF9</text:p>
        </text:list-item>
      </text:list>
      <text:p text:style-name="Horizontal_20_Line"/>
      <text:p text:style-name="P3">PROJECT OVERVIEW:</text:p>
      <text:p text:style-name="P4"/>
      <text:p text:style-name="P6">Mohana Silk is a luxury silk saree e-commerce website project designed to provide users with a modern, elegant and user-friendly shopping experience for traditional and contemporary sarees.</text:p>
      <text:p text:style-name="P6"/>
      <text:p text:style-name="P6">The website focuses on:</text:p>
      <text:p text:style-name="P6">- smooth navigation</text:p>
      <text:p text:style-name="P6">- premium visual design</text:p>
      <text:p text:style-name="P6">- product categorization</text:p>
      <text:p text:style-name="P6">- saree exchange offers</text:p>
      <text:p text:style-name="P6">- new arrivals</text:p>
      <text:p text:style-name="P6">- price-based shopping</text:p>
      <text:p text:style-name="P6">- responsive user interface</text:p>
      <text:p text:style-name="P6"/>
      <text:p text:style-name="P6">The project is inspired by existing saree websites such as Nalli, Madras Sarees and other premium ethnic fashion platforms while maintaining its own unique identity and layout structure.</text:p>
      <text:p text:style-name="Horizontal_20_Line"/>
      <text:p text:style-name="P3">PROJECT OBJECTIVE:</text:p>
      <text:p text:style-name="P6"/>
      <text:p text:style-name="P6">The objective of this project is to develop a responsive and visually appealing silk saree e-commerce platform that allows users to easily explore saree collections, view offers, shop based on categories and pricing, and interact with the brand through a premium digital experience.</text:p>
      <text:p text:style-name="Horizontal_20_Line"/>
      <text:p text:style-name="P6"/>
      <text:p text:style-name="P3">TARGET USERS:</text:p>
      <text:p text:style-name="P6"/>
      <text:p text:style-name="P6">- Women shopping for silk sarees</text:p>
      <text:p text:style-name="P6"><text:soft-page-break/>- Bridal saree buyers</text:p>
      <text:p text:style-name="P6">- Festival and occasion shoppers</text:p>
      <text:p text:style-name="P6">- Traditional wear customers</text:p>
      <text:p text:style-name="P6">- Users searching for sarees within specific budgets</text:p>
      <text:p text:style-name="P6">- Customers interested in saree exchange offers</text:p>
      <text:p text:style-name="Horizontal_20_Line"/>
      <text:p text:style-name="P3">WEBSITE FEATURES:</text:p>
      <text:p text:style-name="P6"/>
      <text:p text:style-name="P6">1. Sticky Navigation Header</text:p>
      <text:p text:style-name="P6">2. Hero Banner Carousel</text:p>
      <text:p text:style-name="P6">3. Product Categories Section</text:p>
      <text:p text:style-name="P6">4. Price Range Shopping Section</text:p>
      <text:p text:style-name="P6">5. New Arrivals Section</text:p>
      <text:p text:style-name="P6">6. Saree Exchange Offer Section</text:p>
      <text:p text:style-name="P6">7. Featured Collections</text:p>
      <text:p text:style-name="P6">8. Wishlist and Cart</text:p>
      <text:p text:style-name="P6">9. Responsive Product Cards</text:p>
      <text:p text:style-name="P6">10. Large Informative Footer</text:p>
      <text:p text:style-name="P6">11. Social Media Integration</text:p>
      <text:p text:style-name="P6">12. WhatsApp Contact Support</text:p>
      <text:p text:style-name="P6">13. Search Functionality</text:p>
      <text:p text:style-name="P6">14. Smooth Scrolling Experience</text:p>
      <text:p text:style-name="Horizontal_20_Line"/>
      <text:p text:style-name="P3">WEBSITE FLOW:</text:p>
      <text:p text:style-name="P6"/>
      <text:p text:style-name="P6">1. Header Section</text:p>
      <text:p text:style-name="P6">2. Hero Banner Carousel</text:p>
      <text:p text:style-name="P6">3. Categories Section</text:p>
      <text:p text:style-name="P6">4. Featured Collections</text:p>
      <text:p text:style-name="P6">5. Price Range Section</text:p>
      <text:p text:style-name="P6">6. New Arrivals Section</text:p>
      <text:p text:style-name="P6">7. Saree Exchange Offer Banner</text:p>
      <text:p text:style-name="P6">8. Promotional Sections</text:p>
      <text:p text:style-name="P6">9. Footer Section</text:p>
      <text:p text:style-name="Horizontal_20_Line"/>
      <text:p text:style-name="P3">HEADER CONTENT:</text:p>
      <text:p text:style-name="P6"/>
      <text:p text:style-name="P6">- Website Logo</text:p>
      <text:p text:style-name="P6">- Categories</text:p>
      <text:p text:style-name="P6">- New Arrivals</text:p>
      <text:p text:style-name="P6">- Saree Exchange</text:p>
      <text:p text:style-name="P6">- Wishlist</text:p>
      <text:p text:style-name="P6">- Shopping Cart</text:p>
      <text:p text:style-name="P6">- Search Bar</text:p>
      <text:p text:style-name="P6">- User Profile/Login</text:p>
      <text:p text:style-name="Horizontal_20_Line"/>
      <text:p text:style-name="P3">HERO SECTION DETAILS:</text:p>
      <text:p text:style-name="P6"/>
      <text:p text:style-name="P6">The hero carousel banner will contain promotional slides such as:</text:p>
      <text:p text:style-name="P6"><text:soft-page-break/>- Today's Deals</text:p>
      <text:p text:style-name="P6">- Wedding Silk Collection</text:p>
      <text:p text:style-name="P6">- Casual Wear Offers</text:p>
      <text:p text:style-name="P6">- Exchange Your Old Saree</text:p>
      <text:p text:style-name="P6">- Festival Offers</text:p>
      <text:p text:style-name="P6">- Seasonal Discounts</text:p>
      <text:p text:style-name="P6">- Premium Silk Promotions</text:p>
      <text:p text:style-name="P6"/>
      <text:p text:style-name="P6">The carousel will automatically slide and also support manual navigation.</text:p>
      <text:p text:style-name="Horizontal_20_Line"/>
      <text:p text:style-name="P3">DESIGN STYLE:</text:p>
      <text:p text:style-name="P6"/>
      <text:p text:style-name="P6">The website follows a luxury and elegant design approach inspired by premium silk saree brands.</text:p>
      <text:p text:style-name="P6"/>
      <text:p text:style-name="P6">Design characteristics include:</text:p>
      <text:p text:style-name="P6">- clean layouts</text:p>
      <text:p text:style-name="P6">- premium typography</text:p>
      <text:p text:style-name="P6">- soft shadows</text:p>
      <text:p text:style-name="P6">- spacious sections</text:p>
      <text:p text:style-name="P6">- cream/light backgrounds</text:p>
      <text:p text:style-name="P6">- navy blue and gold color accents</text:p>
      <text:p text:style-name="P6">- modern responsive UI</text:p>
      <text:p text:style-name="Horizontal_20_Line"/>
      <text:p text:style-name="P3">TYPOGRAPHY:</text:p>
      <text:p text:style-name="P6"/>
      <text:p text:style-name="P6">Heading Font:</text:p>
      <text:p text:style-name="P6">- Playfair Display</text:p>
      <text:p text:style-name="P6"/>
      <text:p text:style-name="P6">Body Font:</text:p>
      <text:p text:style-name="P6">- Poppins</text:p>
      <text:p text:style-name="P6"/>
      <text:p text:style-name="P6">The typography combination is selected to create a premium and elegant fashion website appearance.</text:p>
      <text:p text:style-name="Horizontal_20_Line"/>
      <text:p text:style-name="P3">TECHNOLOGIES USED:</text:p>
      <text:p text:style-name="P6"/>
      <text:p text:style-name="P6">Frontend:</text:p>
      <text:p text:style-name="P6">- HTML5</text:p>
      <text:p text:style-name="P6">- CSS3</text:p>
      <text:p text:style-name="P6">- JavaScript</text:p>
      <text:p text:style-name="P6"/>
      <text:p text:style-name="P6">Future Enhancements:</text:p>
      <text:p text:style-name="P6">- React.js</text:p>
      <text:p text:style-name="P6">- Firebase / Backend Integration</text:p>
      <text:p text:style-name="P6">- Payment Gateway</text:p>
      <text:p text:style-name="P6">- Database Integration</text:p>
      <text:p text:style-name="Horizontal_20_Line"/>
      <text:p text:style-name="P3">FUTURE ENHANCEMENTS:</text:p>
      <text:p text:style-name="P6"><text:soft-page-break/></text:p>
      <text:p text:style-name="P6">- User Authentication</text:p>
      <text:p text:style-name="P6">- Online Payments</text:p>
      <text:p text:style-name="P6">- Order Tracking</text:p>
      <text:p text:style-name="P6">- AI-Based Recommendations</text:p>
      <text:p text:style-name="P6">- Dark Mode</text:p>
      <text:p text:style-name="P6">- Mobile Application</text:p>
      <text:p text:style-name="P6">- Admin Dashboard</text:p>
      <text:p text:style-name="P6">- Product Filtering</text:p>
      <text:p text:style-name="P6">- Customer Reviews</text:p>
      <text:p text:style-name="Horizontal_20_Line"/>
      <text:p text:style-name="P3">SPECIAL FEATURE:</text:p>
      <text:p text:style-name="P6"/>
      <text:p text:style-name="P6">The website includes a dedicated Saree Exchange Offer section where customers can exchange eligible old sarees and receive offers or discounts on new purchases.</text:p>
      <text:p text:style-name="P7"/>
      <text:p text:style-name="P8">UI/UX INSPIRATION:</text:p>
      <text:p text:style-name="P6"/>
      <text:p text:style-name="P6">The project UI inspiration is taken from:</text:p>
      <text:p text:style-name="P6">- Nalli</text:p>
      <text:p text:style-name="P6">- Madras Sarees</text:p>
      <text:p text:style-name="P6">- Other modern ethnic fashion e-commerce websites</text:p>
      <text:p text:style-name="P6"/>
      <text:p text:style-name="P6">The goal is to combine luxury aesthetics with smooth user experience and simplified shopping navigation.</text:p>
      <text:p text:style-name="Horizontal_20_Line"/>
      <text:p text:style-name="P3">PERSONAL NOTE:</text:p>
      <text:p text:style-name="P6"/>
      <text:p text:style-name="P6">This project is being developed as a frontend web development practice project focused on improving UI/UX design skills, responsive layout structuring and modern e-commerce website development concepts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bold" officeooo:rsid="00126b42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6:44:10.443624200</meta:creation-date>
    <dc:date>2026-05-30T11:24:18.048515000</dc:date>
    <meta:editing-duration>PT3M55S</meta:editing-duration>
    <meta:editing-cycles>2</meta:editing-cycles>
    <meta:generator>LibreOffice/25.8.5.2$Windows_X86_64 LibreOffice_project/9c8b85f387cc00a89945a79c9e6239f32e450ac2</meta:generator>
    <meta:document-statistic meta:table-count="0" meta:image-count="1" meta:object-count="0" meta:page-count="4" meta:paragraph-count="118" meta:word-count="572" meta:character-count="3675" meta:non-whitespace-character-count="3224"/>
  </office:meta>
</office:document-meta>
</file>